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 Medium" svg:font-family="'Quicksand Medium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Quicksand Medium" fo:font-size="12pt" officeooo:rsid="0014bf0c" officeooo:paragraph-rsid="0014bf0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Quicksand Medium" fo:font-size="12pt" officeooo:rsid="0014bf0c" officeooo:paragraph-rsid="0014bf0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Quicksand Medium" fo:font-size="12pt" style:text-underline-style="solid" style:text-underline-width="auto" style:text-underline-color="font-color" officeooo:rsid="0014bf0c" officeooo:paragraph-rsid="0014bf0c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Quicksand Medium" fo:font-size="12pt" style:text-underline-style="none" officeooo:rsid="0014bf0c" officeooo:paragraph-rsid="0014bf0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Quicksand Medium" fo:font-size="12pt" style:text-underline-style="none" fo:font-weight="normal" officeooo:rsid="0014bf0c" officeooo:paragraph-rsid="0014bf0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Quicksand Medium" fo:font-size="12pt" style:text-underline-style="solid" style:text-underline-width="auto" style:text-underline-color="font-color" officeooo:rsid="0016726a" officeooo:paragraph-rsid="0016726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Quicksand Medium" fo:font-size="12pt" style:text-underline-style="none" officeooo:rsid="0016726a" officeooo:paragraph-rsid="0016726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Quicksand Medium" fo:font-size="12pt" style:text-underline-style="none" officeooo:rsid="0015ec5b" officeooo:paragraph-rsid="0015ec5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Quicksand Medium" fo:font-size="12pt" style:text-underline-style="none" officeooo:rsid="0014bf0c" officeooo:paragraph-rsid="0015ec5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ec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rtex and… (assuming N other players)</text:p>
      <text:p text:style-name="P2"/>
      <text:p text:style-name="P3">Absorb</text:p>
      <text:p text:style-name="P4">Choose a direction. That direction is applied connecting you with everyone.</text:p>
      <text:p text:style-name="P4">+1 for others and -N for you,<text:span text:style-name="T1"> OR </text:span>-1 for others and +N for you</text:p>
      <text:p text:style-name="P4"/>
      <text:p text:style-name="P3">Broken Add 1</text:p>
      <text:p text:style-name="P4">+0.5 for all, +N/2 for you</text:p>
      <text:p text:style-name="P4"/>
      <text:p text:style-name="P3">Broken Sub 1</text:p>
      <text:p text:style-name="P4">-0.5 for all, -N/2 for you</text:p>
      <text:p text:style-name="P4"/>
      <text:p text:style-name="P3">Card Link</text:p>
      <text:p text:style-name="P4">Everyone’s final card is averaged with your INITIAL final<text:span text:style-name="T2"> card.</text:span></text:p>
      <text:p text:style-name="P5">Your card is averaged with ALL final cards.</text:p>
      <text:p text:style-name="P4"/>
      <text:p text:style-name="P3">Card Swap</text:p>
      <text:p text:style-name="P4">Everyone’s final card becomes your INITIAL final card.</text:p>
      <text:p text:style-name="P4">You obtain everyone’s final card.</text:p>
      <text:p text:style-name="P4"/>
      <text:p text:style-name="P3">Chain Shield</text:p>
      <text:p text:style-name="P4">Cannot be used with Vortex, because it would no longer be an immediate response.</text:p>
      <text:p text:style-name="P4"/>
      <text:p text:style-name="P6">Clone Hands</text:p>
      <text:p text:style-name="P7">You receive a cloned version of all hands on the table.</text:p>
      <text:p text:style-name="P4"/>
      <text:p text:style-name="P3">Daring Dance</text:p>
      <text:p text:style-name="P4">Its effect is applied to everyone. Everyone must beat your initial hand. You still stand immediately.</text:p>
      <text:p text:style-name="P4"/>
      <text:p text:style-name="P3">Double Add 1</text:p>
      <text:p text:style-name="P4">+1 for all, +N for you</text:p>
      <text:p text:style-name="P4"/>
      <text:p text:style-name="P3">Double Sub 1</text:p>
      <text:p text:style-name="P4">-1 for all, -N for you</text:p>
      <text:p text:style-name="P4"/>
      <text:p text:style-name="P3">Force Hit</text:p>
      <text:p text:style-name="P4">Everyone’s next move will be to Hit. If their turn has already passed, they are not effected.</text:p>
      <text:p text:style-name="P4"/>
      <text:p text:style-name="P3">Force Stand</text:p>
      <text:p text:style-name="P4">Everyone’s next move will be to Stand. If their turn has already passed, they are not effected.</text:p>
      <text:p text:style-name="P4"/>
      <text:p text:style-name="P3">Force Water</text:p>
      <text:p text:style-name="P8"><text:soft-page-break/>Everyone has to drink water if you have not already played a Force Water on them. Water Cooler functions independently.</text:p>
      <text:p text:style-name="P8"/>
      <text:p text:style-name="P3">Forward</text:p>
      <text:p text:style-name="P8">Your next card drawn is sent to everybody, including yourself (you do NOT receive a duplicate).</text:p>
      <text:p text:style-name="P8"/>
      <text:p text:style-name="P3">Mirror</text:p>
      <text:p text:style-name="P9">Cannot be used with Vortex, because it would no longer be an immediate response.</text:p>
      <text:p text:style-name="P3"/>
      <text:p text:style-name="P3">PvP Add <text:span text:style-name="T3">X</text:span></text:p>
      <text:p text:style-name="P8">+X for all players (including yourself).</text:p>
      <text:p text:style-name="P4"/>
      <text:p text:style-name="P3">PvP Sub <text:span text:style-name="T3">X</text:span></text:p>
      <text:p text:style-name="P4">-<text:span text:style-name="T3">X for all players (including yourself).</text:span></text:p>
      <text:p text:style-name="P3"/>
      <text:p text:style-name="P3">Robbery</text:p>
      <text:p text:style-name="P8">Steal everybody else’s final card.</text:p>
      <text:p text:style-name="P8"/>
      <text:p text:style-name="P3">Snowflake</text:p>
      <text:p text:style-name="P8">The next card everybody draws this round will be increased by 2.</text:p>
      <text:p text:style-name="P4"/>
      <text:p text:style-name="P3">Swap Hands</text:p>
      <text:p text:style-name="P8">Everyone receives a copy of your hand. You receive everyone’s hand in turn order, as one large hand.</text:p>
      <text:p text:style-name="P3"/>
      <text:p text:style-name="P3">Try Again</text:p>
      <text:p text:style-name="P8">Every hand redraws their final card.</text:p>
      <text:p text:style-name="P8"/>
      <text:p text:style-name="P3">Zap</text:p>
      <text:p text:style-name="P8">Everyone else has a PU slot occupied by Zap if they have one available. Your Zap will take up 2 PU slots (2nd from zapping yourself) if you have a second availa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 Medium" svg:font-family="'Quicksan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9T09:55:09.624157565</meta:creation-date>
    <dc:date>2026-07-19T10:17:21.226652204</dc:date>
    <meta:editing-duration>PT9M50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48" meta:word-count="341" meta:character-count="1866" meta:non-whitespace-character-count="1573"/>
  </office:meta>
</office:document-meta>
</file>