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2A00000224D5DA51F4.png" manifest:media-type="image/png"/>
  <manifest:file-entry manifest:full-path="Pictures/100000010000033D000001C41C44414C.png" manifest:media-type="image/png"/>
  <manifest:file-entry manifest:full-path="Pictures/100000010000021F00000169ABEF0E80.png" manifest:media-type="image/png"/>
  <manifest:file-entry manifest:full-path="Pictures/10000001000000B4000001049355DFFB.png" manifest:media-type="image/png"/>
  <manifest:file-entry manifest:full-path="Pictures/100000010000038300000230B6CD20E3.png" manifest:media-type="image/png"/>
  <manifest:file-entry manifest:full-path="Pictures/1000000000000640000000B85243E191.png" manifest:media-type="image/png"/>
  <manifest:file-entry manifest:full-path="Pictures/10000001000001B1000001086F176E9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Kami North" svg:font-family="'Kami North'" style:font-adornments="Bold" style:font-pitch="variable"/>
    <style:font-face style:name="Kami North1" svg:font-family="'Kami Nor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style:vertical-align="middle" fo:padding="0.0382in" fo:border="none"/>
    </style:style>
    <style:style style:name="Table1.B1" style:family="table-cell">
      <style:table-cell-properties style:vertical-align="middle" fo:padding="0.0382in" fo:border-left="1.5pt solid #ffffff" fo:border-right="none" fo:border-top="none" fo:border-bottom="non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none"/>
    </style:style>
    <style:style style:name="Table3" style:family="table">
      <style:table-properties style:width="6.925in" table:align="margins"/>
    </style:style>
    <style:style style:name="Table3.A" style:family="table-column">
      <style:table-column-properties style:column-width="1.3847in" style:rel-column-width="13107*"/>
    </style:style>
    <style:style style:name="Table3.A1" style:family="table-cell">
      <style:table-cell-properties fo:padding="0.0382in" fo:border="none"/>
    </style:style>
    <style:style style:name="Table3.C1" style:family="table-cell">
      <style:table-cell-properties style:vertical-align="middle" fo:padding="0.0382in" fo:border="none"/>
    </style:style>
    <style:style style:name="P1" style:family="paragraph" style:parent-style-name="Standard">
      <style:paragraph-properties fo:line-height="115%" fo:text-align="center" style:justify-single-word="false"/>
      <style:text-properties officeooo:rsid="001f051a" officeooo:paragraph-rsid="001f051a"/>
    </style:style>
    <style:style style:name="P2" style:family="paragraph" style:parent-style-name="Standard">
      <style:paragraph-properties fo:line-height="115%" fo:text-align="center" style:justify-single-word="false"/>
      <style:text-properties fo:font-size="12pt" style:text-underline-style="solid" style:text-underline-width="auto" style:text-underline-color="font-color" officeooo:rsid="001f051a" officeooo:paragraph-rsid="001f051a" style:font-size-asian="10.5pt" style:font-size-complex="12pt"/>
    </style:style>
    <style:style style:name="P3" style:family="paragraph" style:parent-style-name="Standard">
      <style:paragraph-properties fo:line-height="115%" fo:text-align="center" style:justify-single-word="false"/>
      <style:text-properties fo:font-size="36pt" style:text-underline-style="none" fo:font-weight="bold" officeooo:rsid="001f051a" officeooo:paragraph-rsid="001f051a" style:font-size-asian="31.5pt" style:font-weight-asian="bold" style:font-size-complex="36pt" style:font-weight-complex="bold"/>
    </style:style>
    <style:style style:name="P4" style:family="paragraph" style:parent-style-name="Standard">
      <style:paragraph-properties fo:line-height="115%" fo:text-align="justify" style:justify-single-word="false"/>
      <style:text-properties fo:font-size="16pt" fo:font-style="normal" style:text-underline-style="none" fo:font-weight="bold" officeooo:rsid="001f051a" officeooo:paragraph-rsid="001f051a" style:font-size-asian="16pt" style:font-style-asian="normal" style:font-weight-asian="bold" style:font-size-complex="16pt" style:font-style-complex="normal" style:font-weight-complex="bold"/>
    </style:style>
    <style:style style:name="P5" style:family="paragraph" style:parent-style-name="Standard">
      <style:paragraph-properties fo:line-height="115%" fo:text-align="justify" style:justify-single-word="false"/>
      <style:text-properties fo:font-size="16pt" fo:font-style="normal" style:text-underline-style="none" fo:font-weight="normal" officeooo:rsid="001f051a" officeooo:paragraph-rsid="001f051a" style:font-size-asian="14pt" style:font-style-asian="normal" style:font-weight-asian="normal" style:font-size-complex="16pt" style:font-style-complex="normal" style:font-weight-complex="normal"/>
    </style:style>
    <style:style style:name="P6" style:family="paragraph" style:parent-style-name="Standard">
      <style:paragraph-properties fo:line-height="115%" fo:text-align="justify" style:justify-single-word="false" fo:break-before="page"/>
      <style:text-properties fo:font-size="24pt" fo:font-style="normal" style:text-underline-style="none" fo:font-weight="bold" officeooo:rsid="001f051a" officeooo:paragraph-rsid="001f051a" style:font-size-asian="21pt" style:font-style-asian="normal" style:font-weight-asian="bold" style:font-size-complex="24pt" style:font-style-complex="normal" style:font-weight-complex="bold"/>
    </style:style>
    <style:style style:name="P7" style:family="paragraph" style:parent-style-name="Standard">
      <style:paragraph-properties fo:line-height="115%" fo:text-align="justify" style:justify-single-word="false"/>
      <style:text-properties fo:font-variant="normal" fo:text-transform="none" fo:color="#ffffff" loext:opacity="100%" style:text-line-through-style="none" style:text-line-through-type="none" fo:font-size="16pt" fo:font-style="normal" style:text-underline-style="none" fo:font-weight="normal" officeooo:rsid="001f051a" officeooo:paragraph-rsid="001f051a" style:text-blinking="false" fo:background-color="transparent" style:font-size-asian="14pt" style:font-style-asian="normal" style:font-weight-asian="normal" style:font-size-complex="16pt" style:font-style-complex="normal" style:font-weight-complex="normal" loext:padding="0in" loext:border="none"/>
    </style:style>
    <style:style style:name="P8" style:family="paragraph" style:parent-style-name="Standard">
      <style:paragraph-properties fo:line-height="115%" fo:text-align="justify" style:justify-single-word="false"/>
      <style:text-properties officeooo:paragraph-rsid="001f051a"/>
    </style:style>
    <style:style style:name="P9" style:family="paragraph" style:parent-style-name="Table_20_Contents">
      <style:paragraph-properties fo:text-align="center" style:justify-single-word="false"/>
      <style:text-properties fo:font-size="16pt" style:text-underline-style="solid" style:text-underline-width="auto" style:text-underline-color="font-color" fo:font-weight="bold" officeooo:rsid="001f051a" officeooo:paragraph-rsid="001f051a" style:font-size-asian="16pt" style:font-weight-asian="bold" style:font-size-complex="16pt" style:font-weight-complex="bold"/>
    </style:style>
    <style:style style:name="P10" style:family="paragraph" style:parent-style-name="Table_20_Contents">
      <style:paragraph-properties fo:text-align="center" style:justify-single-word="false"/>
      <style:text-properties fo:font-size="16pt" officeooo:rsid="001f051a" officeooo:paragraph-rsid="001f051a" style:font-size-asian="16pt" style:font-size-complex="16pt"/>
    </style:style>
    <style:style style:name="P11" style:family="paragraph" style:parent-style-name="Standard">
      <style:paragraph-properties fo:line-height="115%" fo:text-align="justify" style:justify-single-word="false"/>
      <style:text-properties officeooo:rsid="001f051a" officeooo:paragraph-rsid="001f051a"/>
    </style:style>
    <style:style style:name="P12" style:family="paragraph" style:parent-style-name="Table_20_Contents">
      <style:paragraph-properties fo:text-align="center" style:justify-single-word="false"/>
      <style:text-properties fo:font-size="16pt" fo:font-style="italic" officeooo:rsid="001f051a" officeooo:paragraph-rsid="001f051a" style:font-size-asian="16pt" style:font-style-asian="italic" style:font-size-complex="16pt" style:font-style-complex="italic"/>
    </style:style>
    <style:style style:name="P13" style:family="paragraph" style:parent-style-name="Standard">
      <style:paragraph-properties fo:line-height="115%" fo:text-align="justify" style:justify-single-word="false"/>
      <style:text-properties fo:font-size="12pt" fo:font-weight="bold" officeooo:rsid="001f051a" officeooo:paragraph-rsid="001f051a" style:font-size-asian="12pt" style:font-weight-asian="bold" style:font-size-complex="12pt" style:font-weight-complex="bold"/>
    </style:style>
    <style:style style:name="P14" style:family="paragraph" style:parent-style-name="Standard">
      <style:paragraph-properties fo:line-height="115%" fo:text-align="justify" style:justify-single-word="false"/>
      <style:text-properties fo:font-weight="bold" officeooo:rsid="001f051a" officeooo:paragraph-rsid="001f051a" style:font-weight-asian="bold" style:font-weight-complex="bold"/>
    </style:style>
    <style:style style:name="P15" style:family="paragraph" style:parent-style-name="Standard" style:master-page-name="">
      <style:paragraph-properties fo:line-height="115%" fo:text-align="justify" style:justify-single-word="false" style:page-number="auto" fo:break-before="auto" fo:break-after="auto"/>
      <style:text-properties fo:font-size="16pt" fo:font-style="normal" style:text-underline-style="none" fo:font-weight="normal" officeooo:rsid="001f051a" officeooo:paragraph-rsid="00203ff3" style:font-size-asian="14pt" style:font-style-asian="normal" style:font-weight-asian="normal" style:font-size-complex="16pt" style:font-style-complex="normal" style:font-weight-complex="normal"/>
    </style:style>
    <style:style style:name="P16" style:family="paragraph" style:parent-style-name="Standard">
      <style:paragraph-properties fo:line-height="115%" fo:text-align="justify" style:justify-single-word="false" fo:break-before="page"/>
      <style:text-properties fo:font-size="24pt" fo:font-style="normal" style:text-underline-style="none" fo:font-weight="bold" officeooo:rsid="001f051a" officeooo:paragraph-rsid="00203ff3" style:font-size-asian="21pt" style:font-style-asian="normal" style:font-weight-asian="bold" style:font-size-complex="24pt" style:font-style-complex="normal" style:font-weight-complex="bold"/>
    </style:style>
    <style:style style:name="P17" style:family="paragraph" style:parent-style-name="Standard">
      <style:paragraph-properties fo:line-height="115%" fo:text-align="justify" style:justify-single-word="false"/>
      <style:text-properties fo:font-size="16pt" fo:font-style="normal" style:text-underline-style="none" fo:font-weight="bold" officeooo:rsid="001f051a" officeooo:paragraph-rsid="00203ff3" style:font-size-asian="14pt" style:font-style-asian="normal" style:font-weight-asian="bold" style:font-size-complex="16pt" style:font-style-complex="normal" style:font-weight-complex="bold"/>
    </style:style>
    <style:style style:name="P18" style:family="paragraph" style:parent-style-name="Standard">
      <style:paragraph-properties fo:line-height="115%" fo:text-align="justify" style:justify-single-word="false"/>
      <style:text-properties fo:font-size="16pt" fo:font-style="normal" style:text-underline-style="none" fo:font-weight="normal" officeooo:rsid="001f051a" officeooo:paragraph-rsid="00203ff3" style:font-size-asian="14pt" style:font-style-asian="normal" style:font-weight-asian="normal" style:font-size-complex="16pt" style:font-style-complex="normal" style:font-weight-complex="normal"/>
    </style:style>
    <style:style style:name="P19" style:family="paragraph" style:parent-style-name="Standard">
      <style:paragraph-properties fo:line-height="115%" fo:text-align="justify" style:justify-single-word="false"/>
      <style:text-properties fo:font-size="16pt" fo:font-style="normal" style:text-underline-style="none" fo:font-weight="normal" officeooo:rsid="00203ff3" officeooo:paragraph-rsid="00203ff3" style:font-size-asian="14pt" style:font-style-asian="normal" style:font-weight-asian="normal" style:font-size-complex="16pt" style:font-style-complex="normal" style:font-weight-complex="normal"/>
    </style:style>
    <style:style style:name="P20" style:family="paragraph" style:parent-style-name="Standard">
      <style:paragraph-properties fo:line-height="115%" fo:text-align="justify" style:justify-single-word="false"/>
      <style:text-properties fo:font-size="20pt" fo:font-style="normal" style:text-underline-style="solid" style:text-underline-width="auto" style:text-underline-color="font-color" fo:font-weight="bold" officeooo:rsid="00203ff3" officeooo:paragraph-rsid="00203ff3" style:font-size-asian="17.5pt" style:font-style-asian="normal" style:font-weight-asian="bold" style:font-size-complex="20pt" style:font-style-complex="normal" style:font-weight-complex="bold"/>
    </style:style>
    <style:style style:name="P21" style:family="paragraph" style:parent-style-name="Standard">
      <style:paragraph-properties fo:line-height="115%" fo:text-align="justify" style:justify-single-word="false" fo:break-before="page"/>
      <style:text-properties fo:font-size="20pt" fo:font-style="normal" style:text-underline-style="solid" style:text-underline-width="auto" style:text-underline-color="font-color" fo:font-weight="bold" officeooo:rsid="00203ff3" officeooo:paragraph-rsid="00203ff3" style:font-size-asian="17.5pt" style:font-style-asian="normal" style:font-weight-asian="bold" style:font-size-complex="20pt" style:font-style-complex="normal" style:font-weight-complex="bold"/>
    </style:style>
    <style:style style:name="P22" style:family="paragraph" style:parent-style-name="Standard">
      <style:paragraph-properties fo:line-height="115%" fo:text-align="justify" style:justify-single-word="false"/>
      <style:text-properties officeooo:paragraph-rsid="00203ff3"/>
    </style:style>
    <style:style style:name="P23" style:family="paragraph" style:parent-style-name="Standard">
      <style:paragraph-properties fo:line-height="115%" fo:text-align="justify" style:justify-single-word="false"/>
      <style:text-properties fo:font-size="16pt" fo:font-style="normal" style:text-underline-style="none" fo:font-weight="normal" officeooo:rsid="00203ff3" officeooo:paragraph-rsid="002e50b2" style:font-size-asian="14pt" style:font-style-asian="normal" style:font-weight-asian="normal" style:font-size-complex="16pt" style:font-style-complex="normal" style:font-weight-complex="normal"/>
    </style:style>
    <style:style style:name="P24" style:family="paragraph" style:parent-style-name="Table_20_Contents">
      <style:paragraph-properties fo:text-align="center" style:justify-single-word="false"/>
      <style:text-properties fo:color="#ffff00" loext:opacity="100%" fo:font-size="16pt" fo:font-weight="bold" officeooo:rsid="00203ff3" officeooo:paragraph-rsid="00203ff3" style:font-size-asian="14pt" style:font-weight-asian="bold" style:font-size-complex="16pt" style:font-weight-complex="bold"/>
    </style:style>
    <style:style style:name="P25" style:family="paragraph" style:parent-style-name="Standard">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color="#aaaaaa" loext:opacity="100%" fo:font-size="12pt" fo:font-style="italic" fo:font-weight="bold" officeooo:rsid="00203ff3" officeooo:paragraph-rsid="00203ff3" style:font-size-asian="12pt" style:font-style-asian="italic" style:font-weight-asian="bold" style:font-size-complex="12pt" style:font-style-complex="italic" style:font-weight-complex="bold"/>
    </style:style>
    <style:style style:name="P27" style:family="paragraph" style:parent-style-name="Standard">
      <style:paragraph-properties fo:text-align="center" style:justify-single-word="false">
        <style:tab-stops/>
      </style:paragraph-properties>
      <style:text-properties fo:font-size="12pt" style:font-size-asian="12pt" style:font-size-complex="12pt"/>
    </style:style>
    <style:style style:name="P28" style:family="paragraph" style:parent-style-name="Table_20_Contents">
      <style:paragraph-properties fo:text-align="center" style:justify-single-word="false"/>
      <style:text-properties fo:color="#ff00ff" loext:opacity="100%" fo:font-size="16pt" officeooo:rsid="00203ff3" officeooo:paragraph-rsid="00203ff3" style:font-size-asian="14pt" style:font-size-complex="16pt"/>
    </style:style>
    <style:style style:name="P29" style:family="paragraph" style:parent-style-name="Table_20_Contents">
      <style:paragraph-properties fo:text-align="center" style:justify-single-word="false"/>
      <style:text-properties fo:color="#00ffff" loext:opacity="100%" fo:font-size="16pt" officeooo:rsid="00203ff3" officeooo:paragraph-rsid="00203ff3" style:font-size-asian="14pt" style:font-size-complex="16pt"/>
    </style:style>
    <style:style style:name="P30" style:family="paragraph" style:parent-style-name="Table_20_Contents">
      <style:paragraph-properties fo:text-align="center" style:justify-single-word="false"/>
      <style:text-properties fo:color="#aaaaaa" loext:opacity="100%" fo:font-size="12pt" fo:font-style="italic" officeooo:rsid="00203ff3" officeooo:paragraph-rsid="00203ff3" style:font-size-asian="12pt" style:font-style-asian="italic" style:font-size-complex="12pt" style:font-style-complex="italic"/>
    </style:style>
    <style:style style:name="P31" style:family="paragraph" style:parent-style-name="Table_20_Contents">
      <style:paragraph-properties fo:text-align="center" style:justify-single-word="false"/>
      <style:text-properties fo:color="#888888" loext:opacity="100%" fo:font-size="16pt" officeooo:rsid="00203ff3" officeooo:paragraph-rsid="00203ff3" style:font-size-asian="14pt" style:font-size-complex="16pt"/>
    </style:style>
    <style:style style:name="P32" style:family="paragraph" style:parent-style-name="Table_20_Contents">
      <style:paragraph-properties fo:text-align="center" style:justify-single-word="false"/>
      <style:text-properties fo:font-size="16pt" officeooo:rsid="00203ff3" officeooo:paragraph-rsid="00203ff3" style:font-size-asian="14pt" style:font-size-complex="16pt"/>
    </style:style>
    <style:style style:name="P33" style:family="paragraph" style:parent-style-name="Standard">
      <style:paragraph-properties fo:line-height="115%" fo:text-align="justify" style:justify-single-word="false" fo:break-before="page"/>
      <style:text-properties fo:font-size="24pt" fo:font-style="normal" style:text-underline-style="none" fo:font-weight="bold" officeooo:rsid="001f051a" officeooo:paragraph-rsid="0024ac85" style:font-size-asian="21pt" style:font-style-asian="normal" style:font-weight-asian="bold" style:font-size-complex="24pt" style:font-style-complex="normal" style:font-weight-complex="bold"/>
    </style:style>
    <style:style style:name="P34" style:family="paragraph" style:parent-style-name="Standard">
      <style:paragraph-properties fo:line-height="115%" fo:text-align="justify" style:justify-single-word="false"/>
      <style:text-properties fo:font-size="16pt" fo:font-style="normal" style:text-underline-style="none" fo:font-weight="bold" officeooo:rsid="001f051a" officeooo:paragraph-rsid="0024ac85" style:font-size-asian="14pt" style:font-style-asian="normal" style:font-weight-asian="bold" style:font-size-complex="16pt" style:font-style-complex="normal" style:font-weight-complex="bold"/>
    </style:style>
    <style:style style:name="P35" style:family="paragraph" style:parent-style-name="Standard">
      <style:paragraph-properties fo:line-height="115%" fo:text-align="justify" style:justify-single-word="false"/>
      <style:text-properties fo:font-size="16pt" fo:font-style="normal" style:text-underline-style="none" fo:font-weight="normal" officeooo:rsid="001f051a" officeooo:paragraph-rsid="0024ac85" style:font-size-asian="14pt" style:font-style-asian="normal" style:font-weight-asian="normal" style:font-size-complex="16pt" style:font-style-complex="normal" style:font-weight-complex="normal"/>
    </style:style>
    <style:style style:name="T1" style:family="text">
      <style:text-properties fo:font-weight="bold" style:font-weight-asian="bold" style:font-weight-complex="bold"/>
    </style:style>
    <style:style style:name="T2" style:family="text">
      <style:text-properties officeooo:rsid="00203ff3"/>
    </style:style>
    <style:style style:name="T3" style:family="text">
      <style:text-properties officeooo:rsid="0021c5b2"/>
    </style:style>
    <style:style style:name="T4" style:family="text">
      <style:text-properties fo:font-size="16pt" fo:font-style="normal" style:text-underline-style="none" fo:font-weight="normal" officeooo:rsid="001f051a" style:font-size-asian="14pt" style:font-style-asian="normal" style:font-weight-asian="normal" style:font-size-complex="16pt" style:font-style-complex="normal" style:font-weight-complex="normal"/>
    </style:style>
    <style:style style:name="T5" style:family="text">
      <style:text-properties fo:font-size="16pt" fo:font-style="normal" style:text-underline-style="none" fo:font-weight="bold" officeooo:rsid="001f051a" style:font-size-asian="14pt" style:font-style-asian="normal" style:font-weight-asian="bold" style:font-size-complex="16pt" style:font-style-complex="normal" style:font-weight-complex="bold"/>
    </style:style>
    <style:style style:name="T6" style:family="text">
      <style:text-properties fo:font-size="16pt" fo:font-style="normal" style:text-underline-style="none" fo:font-weight="normal" style:font-size-asian="14pt" style:font-style-asian="normal" style:font-weight-asian="normal" style:font-size-complex="16pt" style:font-style-complex="normal" style:font-weight-complex="normal"/>
    </style:style>
    <style:style style:name="T7" style:family="text">
      <style:text-properties fo:font-style="italic" style:text-underline-style="none" style:font-style-asian="italic" style:font-style-complex="italic"/>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size="16pt" fo:font-style="normal" style:text-underline-style="none" style:font-size-asian="14pt" style:font-style-asian="normal" style:font-size-complex="16pt" style:font-style-complex="normal"/>
    </style:style>
    <style:style style:name="T11" style:family="text">
      <style:text-properties fo:font-size="16pt" fo:font-style="normal" style:text-underline-style="none" fo:font-weight="normal" officeooo:rsid="00203ff3" style:font-size-asian="14pt" style:font-style-asian="normal" style:font-weight-asian="normal" style:font-size-complex="16pt" style:font-style-complex="normal" style:font-weight-complex="normal"/>
    </style:style>
    <style:style style:name="T12" style:family="text">
      <style:text-properties fo:font-size="16pt" fo:font-style="normal" style:text-underline-style="none" officeooo:rsid="00203ff3" style:font-size-asian="14pt" style:font-style-asian="normal" style:font-size-complex="16pt" style:font-style-complex="normal"/>
    </style:style>
    <style:style style:name="T13" style:family="text">
      <style:text-properties officeooo:rsid="0032955f"/>
    </style:style>
    <style:style style:name="T14" style:family="text">
      <style:text-properties fo:font-size="20pt" fo:font-style="normal" style:text-underline-style="solid" style:text-underline-width="auto" style:text-underline-color="font-color" fo:font-weight="bold" officeooo:rsid="00203ff3" style:font-size-asian="17.5pt" style:font-style-asian="normal" style:font-weight-asian="bold" style:font-size-complex="20pt" style:font-style-complex="normal" style:font-weight-complex="bold"/>
    </style:style>
    <style:style style:name="T15" style:family="text">
      <style:text-properties fo:font-style="italic" style:font-style-asian="italic" style:font-style-complex="italic"/>
    </style:style>
    <style:style style:name="T16" style:family="text">
      <style:text-properties fo:font-weight="bold" officeooo:rsid="002e50b2" style:font-weight-asian="bold" style:font-weight-complex="bold"/>
    </style:style>
    <style:style style:name="T17" style:family="text">
      <style:text-properties fo:font-weight="bold" officeooo:rsid="004bb9d9" style:font-weight-asian="bold" style:font-weight-complex="bold"/>
    </style:style>
    <style:style style:name="T18" style:family="text">
      <style:text-properties officeooo:rsid="004b78b7"/>
    </style:style>
    <style:style style:name="T19" style:family="text">
      <style:text-properties fo:color="#ff0000" loext:opacity="100%" fo:font-weight="bold" style:font-weight-asian="bold" style:font-weight-complex="bold"/>
    </style:style>
    <style:style style:name="T20" style:family="text">
      <style:text-properties style:text-position="super 58%" officeooo:rsid="00241feb"/>
    </style:style>
    <style:style style:name="T21" style:family="text">
      <style:text-properties officeooo:rsid="0024ac85"/>
    </style:style>
    <style:style style:name="T22" style:family="text">
      <style:text-properties fo:font-weight="bold" officeooo:rsid="0024ac85" style:font-weight-asian="bold" style:font-weight-complex="bold"/>
    </style:style>
    <style:style style:name="fr1" style:family="graphic" style:parent-style-name="Graphics">
      <style:graphic-properties style:run-through="foreground" style:wrap="none"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as-char" svg:width="4.7083in" svg:height="2.8701in" draw:z-index="0"><draw:image xlink:href="Pictures/10000001000001B1000001086F176E91.png" xlink:type="simple" xlink:show="embed" xlink:actuate="onLoad" draw:mime-type="image/png"/></draw:frame></text:p>
      <text:p text:style-name="P2"/>
      <text:p text:style-name="P3">The Notebook</text:p>
      <text:p text:style-name="P3"/>
      <text:p text:style-name="P4"/>
      <text:p text:style-name="P4">TABLE OF CONTENTS</text:p>
      <text:p text:style-name="P5"/>
      <text:p text:style-name="P5"><text:span text:style-name="T1">I.<text:tab/></text:span>How to play Normal Blackjack<text:tab/>.....................................................................<text:tab/>2</text:p>
      <text:p text:style-name="P5"><text:span text:style-name="T1">II.<text:tab/></text:span>Kami North’s Blackjack .....................................................................................<text:tab/><text:span text:style-name="T2">4</text:span></text:p>
      <text:p text:style-name="P5"><text:span text:style-name="T1">III.<text:tab/></text:span>Essences and Powerups ................................................................................<text:tab/><text:span text:style-name="T3">7</text:span></text:p>
      <text:p text:style-name="P6">I.<text:tab/><text:tab/>How to play Normal Blackjack</text:p>
      <text:p text:style-name="P5"/>
      <text:p text:style-name="P5">In blackjack, both you and the <text:span text:style-name="T1">Dealer</text:span> draw two cards at the beginning. Your goal is to get a higher hand value than the Dealer without going over 21. Exceeding 21 is referred to as a <text:span text:style-name="T1">Bust</text:span>, and busting is an instant loss. Cards that are drawn have <text:span text:style-name="T1">ranks,</text:span> where the value of the card is listed on it. There are 13 ranks, and 9 are self-explanatory.</text:p>
      <text:p text:style-name="P5"/>
      <text:p text:style-name="P7"><text:bookmark text:name="docs-internal-guid-da04c09e-7fff-d1e3-5007-065c8df0bcff"/><draw:frame draw:style-name="fr2" draw:name="Image2" text:anchor-type="as-char" svg:width="7.0417in" svg:height="0.802in" draw:z-index="1"><draw:image xlink:href="Pictures/1000000000000640000000B85243E191.png" xlink:type="simple" xlink:show="embed" xlink:actuate="onLoad" draw:mime-type="image/png"/></draw:frame></text:p>
      <text:p text:style-name="P5"/>
      <text:p text:style-name="P5">The J, Q and K are considered <text:span text:style-name="T1">Face Cards, </text:span>and function identically to a 10. The A is an <text:span text:style-name="T1">Ace.</text:span> The ace’s value is either an 11 or a 1, whichever is better for you. If the ace is worth 11, you will have what is known as a <text:span text:style-name="T1">soft</text:span> number, which means going over 21 will let the ace be worth 1 instead. A soft 18 and a regular 18 are the same, but you will not bust when you hit with a soft number.</text:p>
      <text:p text:style-name="P5"><draw:frame draw:style-name="fr3" draw:name="Image3" text:anchor-type="char" svg:x="0.0091in" svg:y="0.1098in" svg:width="3.6571in" svg:height="2.278in" draw:z-index="2"><draw:image xlink:href="Pictures/100000010000038300000230B6CD20E3.png" xlink:type="simple" xlink:show="embed" xlink:actuate="onLoad" draw:mime-type="image/png"/></draw:frame></text:p>
      <text:p text:style-name="P5"><text:tab/>When it is your turn, you will <text:tab/>see the value of your cards <text:tab/>as well as one of the dealer’s <text:tab/>cards.</text:p>
      <text:p text:style-name="P5"><text:bookmark text:name="docs-internal-guid-8cfca9aa-7fff-55af-d89a-a730d91b3fa2"/><text:tab/>On your turn, you can do the <text:tab/>following actions below. You <text:tab/>can only Double Down or Split <text:tab/>if you have not Hit or Stood.</text:p>
      <text:p text:style-name="P8"/>
      <table:table table:name="Table1" table:style-name="Table1">
        <table:table-column table:style-name="Table1.A" table:number-columns-repeated="3"/>
        <table:table-column table:style-name="Table1.D"/>
        <table:table-row>
          <table:table-cell table:style-name="Table1.A1" office:value-type="string">
            <text:p text:style-name="P9">Hit</text:p>
          </table:table-cell>
          <table:table-cell table:style-name="Table1.B1" office:value-type="string">
            <text:p text:style-name="P9">Stand</text:p>
          </table:table-cell>
          <table:table-cell table:style-name="Table1.B1" office:value-type="string">
            <text:p text:style-name="P9">Double Down</text:p>
          </table:table-cell>
          <table:table-cell table:style-name="Table1.B1" office:value-type="string">
            <text:p text:style-name="P9">Split</text:p>
          </table:table-cell>
        </table:table-row>
        <table:table-row>
          <table:table-cell table:style-name="Table1.A1" office:value-type="string">
            <text:p text:style-name="P10">Draw an additional card.</text:p>
          </table:table-cell>
          <table:table-cell table:style-name="Table1.B1" office:value-type="string">
            <text:p text:style-name="P10">End your turn.</text:p>
          </table:table-cell>
          <table:table-cell table:style-name="Table1.B1" office:value-type="string">
            <text:p text:style-name="P10">Double your bet, hit once, and end your turn.</text:p>
          </table:table-cell>
          <table:table-cell table:style-name="Table1.B1" office:value-type="string">
            <text:p text:style-name="P10">If you have a pair, play each card as a hand of its own.</text:p>
          </table:table-cell>
        </table:table-row>
      </table:table>
      <text:p text:style-name="P8"><text:soft-page-break/><text:span text:style-name="T4">Kami North’s Blackjack uses Tabletop Simulator’s </text:span><text:span text:style-name="T5">Line Tool</text:span><text:span text:style-name="T4"> to shorthand actions. To hit, press Tab while hovering over your cards. An arrow will appear and a ding sound will play. This tells me you’re hitting. To stand, hold Tab and drag a line over your hand. </text:span></text:p>
      <text:p text:style-name="P11"/>
      <text:p text:style-name="P11"><text:span text:style-name="T6"><draw:frame draw:style-name="fr4" draw:name="Image4" text:anchor-type="as-char" svg:width="3.3252in" svg:height="2.2102in" draw:z-index="3"><draw:image xlink:href="Pictures/100000010000021F00000169ABEF0E80.png" xlink:type="simple" xlink:show="embed" xlink:actuate="onLoad" draw:mime-type="image/png"/></draw:frame></text:span><draw:frame draw:style-name="fr5" draw:name="Image5" text:anchor-type="char" svg:x="3.4445in" svg:y="0.2083in" svg:width="3.6402in" svg:height="1.9846in" draw:z-index="4"><draw:image xlink:href="Pictures/100000010000033D000001C41C44414C.png" xlink:type="simple" xlink:show="embed" xlink:actuate="onLoad" draw:mime-type="image/png"/></draw:frame></text:p>
      <table:table table:name="Table2" table:style-name="Table2">
        <table:table-column table:style-name="Table2.A"/>
        <table:table-column table:style-name="Table2.B"/>
        <table:table-row>
          <table:table-cell table:style-name="Table2.A1" office:value-type="string">
            <text:p text:style-name="P12">Hit</text:p>
          </table:table-cell>
          <table:table-cell table:style-name="Table2.A1" office:value-type="string">
            <text:p text:style-name="P12">Stand</text:p>
          </table:table-cell>
        </table:table-row>
      </table:table>
      <text:p text:style-name="P11"/>
      <text:p text:style-name="P13"><text:span text:style-name="T7">NOTE:</text:span><text:span text:style-name="T8"> If you are stuck with the ruler, you can either hit F1 or click the Cursor Tool on the top left corner of the screen.</text:span><text:span text:style-name="T9"><text:tab/></text:span></text:p>
      <text:p text:style-name="P14"/>
      <text:p text:style-name="P14"><text:span text:style-name="T6">After everyone completes their turn, it is time for </text:span><text:span text:style-name="T10">face-off,</text:span><text:span text:style-name="T6"> where the Dealer plays their turn. They first reveal their hidden card, and if their hand value is below 17, they will hit until it is greater than or equal to 17. From there, the value is compared to your hand. If your hand is smaller than the Dealer’s hand, then you lose. If </text:span><text:span text:style-name="T11">it</text:span><text:span text:style-name="T6"> is larger, then you win. If they are the same, then you </text:span><text:span text:style-name="T10">Push</text:span><text:span text:style-name="T6">, which means you get your money back. A player loss is higher priority than dealer loss, so if both bust, the player loses. </text:span><text:span text:style-name="T11">If you have an Ace and a Face (i.e. 21 in 2 cards), you have a </text:span><text:span text:style-name="T12">Blackjack,</text:span><text:span text:style-name="T11"> a guaranteed win.</text:span></text:p>
      <text:p text:style-name="P15"><draw:frame draw:style-name="fr6" draw:name="Image7" text:anchor-type="char" svg:y="0.1366in" svg:width="4.652in" svg:height="2.3917in" draw:z-index="5"><draw:image xlink:href="Pictures/100000010000042A00000224D5DA51F4.png" xlink:type="simple" xlink:show="embed" xlink:actuate="onLoad" draw:mime-type="image/png"/></draw:frame></text:p>
      <text:p text:style-name="P16">I<text:span text:style-name="T2">I</text:span>.<text:tab/><text:tab/><text:span text:style-name="T2">Kami North’s</text:span> Blackjack</text:p>
      <text:p text:style-name="P17"/>
      <text:p text:style-name="P18">Kami North’s Blackjack differs from regular blackjack by adding various mechanics to it. The most prominent additions are the Essences and Powerups, which will be elaborated on in the next chapter. If you get overwhelmed by everything, don’t worry! It’ll come naturally quicker than you’d expect. The other notable features include:<text:span text:style-name="T11"/></text:p>
      <text:p text:style-name="P19"/>
      <text:p text:style-name="P20">Card Tricks</text:p>
      <text:p text:style-name="P19">Card tricks are made by drawing 5 or more cards without busting. These are difficult hands to obtain, but if done, are treated equal <text:span text:style-name="T13">to</text:span> or better t<text:span text:style-name="T13">han</text:span> getting a Blackjack. If you manage to pull off a Card Trick, you are guaranteed victory.</text:p>
      <text:p text:style-name="P18"/>
      <text:p text:style-name="P20">Pulls</text:p>
      <text:p text:style-name="P19">There are several conditions to earning <text:span text:style-name="T1">pulls,</text:span> which are how you obtain <text:span text:style-name="T1">Essences,</text:span> which are crucial to making Powerups. The most common examples include:</text:p>
      <text:p text:style-name="P19"/>
      <text:p text:style-name="P19"><text:span text:style-name="T1">Blackjacks and Card Tricks</text:span> — These typically net 1 pull, sometimes more for larger tricks.</text:p>
      <text:p text:style-name="P19"><text:span text:style-name="T1">Jokers </text:span>— Drawing a joker will guarantee 1 pull.</text:p>
      <text:p text:style-name="P19"><text:span text:style-name="T1">The Pull Timer </text:span>— Every 727 seconds, the pull timer goes off, giving everyone a pull.</text:p>
      <text:p text:style-name="P19"/>
      <text:p text:style-name="P19">You can also earn them through various other means, though they’re less frequent. When you obtain a Pull, you are given a white bag, to which you draw one essence from it. If you gain multiple pulls, you get a bag for each Pull and only take 1 from each bag.</text:p>
      <text:p text:style-name="P21"><draw:frame draw:style-name="fr7" draw:name="Image6" text:anchor-type="paragraph" svg:x="5.9098in" svg:y="0.0701in" svg:width="1.0311in" svg:height="1.4898in" draw:z-index="6"><draw:image xlink:href="Pictures/10000001000000B4000001049355DFFB.png" xlink:type="simple" xlink:show="embed" xlink:actuate="onLoad" draw:mime-type="image/png"/></draw:frame>Jokers</text:p>
      <text:p text:style-name="P22"><text:span text:style-name="T11">The deck consists of 105 cards, 8 of each rank and 1 Joker. Drawing the Joker counts as a value of 0, so your total does not change, making it great for card tricks. Drawing the Joker does not guarantee victory, but you are guaranteed a Pull, even if you lose</text:span><text:bookmark text:name="docs-internal-guid-decc5833-7fff-4668-adb9-f1e8c6e6a696"/><text:span text:style-name="T11">.</text:span></text:p>
      <text:p text:style-name="P19"/>
      <text:p text:style-name="P20">The Lottery<text:span text:style-name="T14"/></text:p>
      <text:p text:style-name="P23">Players often take part in the Lottery, a special system based on <text:span text:style-name="T15">Mario Party 4,</text:span> where they pay 25 chips or a Garbage <text:span text:style-name="T15">(see: Essences and Powerups)</text:span> <text:s/>to draw a colored ball from a bag. <text:span text:style-name="T16">Every time you play the lott</text:span><text:span text:style-name="T17">ery</text:span><text:span text:style-name="T16"> in the same round, the price increases by base cost.</text:span></text:p>
      <text:p text:style-name="P23">There are 5 outcomes:</text:p>
      <table:table table:name="Table3" table:style-name="Table3">
        <table:table-column table:style-name="Table3.A" table:number-columns-repeated="5"/>
        <table:table-row>
          <table:table-cell table:style-name="Table3.A1" table:number-columns-spanned="2" office:value-type="string">
            <text:p text:style-name="P24">Log Token</text:p>
          </table:table-cell>
          <table:covered-table-cell/>
          <table:table-cell table:style-name="Table3.C1" office:value-type="string">
            <text:p text:style-name="P25">Pulls</text:p>
          </table:table-cell>
          <table:table-cell table:style-name="Table3.C1" office:value-type="string">
            <text:p text:style-name="P25">Cost (<text:span text:style-name="T18">Chips</text:span>)</text:p>
          </table:table-cell>
          <table:table-cell table:style-name="Table3.C1" office:value-type="string">
            <text:p text:style-name="P25">Cost (G<text:span text:style-name="T18">arbage</text:span>)</text:p>
          </table:table-cell>
        </table:table-row>
        <table:table-row>
          <table:table-cell table:style-name="Table3.A1" table:number-columns-spanned="2" office:value-type="string">
            <text:p text:style-name="P26">0.5%</text:p>
          </table:table-cell>
          <table:covered-table-cell/>
          <table:table-cell table:style-name="Table3.C1" office:value-type="string">
            <text:p text:style-name="P25">1</text:p>
          </table:table-cell>
          <table:table-cell table:style-name="Table3.C1" office:value-type="string">
            <text:p text:style-name="P27">25</text:p>
          </table:table-cell>
          <table:table-cell table:style-name="Table3.C1" office:value-type="string">
            <text:p text:style-name="P27">1</text:p>
          </table:table-cell>
        </table:table-row>
        <table:table-row>
          <table:table-cell table:style-name="Table3.A1" office:value-type="string">
            <text:p text:style-name="P28">$100</text:p>
          </table:table-cell>
          <table:table-cell table:style-name="Table3.A1" office:value-type="string">
            <text:p text:style-name="P29">1 Pull</text:p>
          </table:table-cell>
          <table:table-cell table:style-name="Table3.C1" office:value-type="string">
            <text:p text:style-name="P25">2</text:p>
          </table:table-cell>
          <table:table-cell table:style-name="Table3.C1" office:value-type="string">
            <text:p text:style-name="P27">75</text:p>
          </table:table-cell>
          <table:table-cell table:style-name="Table3.C1" office:value-type="string">
            <text:p text:style-name="P27">3</text:p>
          </table:table-cell>
        </table:table-row>
        <table:table-row>
          <table:table-cell table:style-name="Table3.A1" office:value-type="string">
            <text:p text:style-name="P30">~5-10%</text:p>
          </table:table-cell>
          <table:table-cell table:style-name="Table3.A1" office:value-type="string">
            <text:p text:style-name="P30">~10-15%</text:p>
          </table:table-cell>
          <table:table-cell table:style-name="Table3.C1" office:value-type="string">
            <text:p text:style-name="P25">3</text:p>
          </table:table-cell>
          <table:table-cell table:style-name="Table3.C1" office:value-type="string">
            <text:p text:style-name="P27">150</text:p>
          </table:table-cell>
          <table:table-cell table:style-name="Table3.C1" office:value-type="string">
            <text:p text:style-name="P27">6</text:p>
          </table:table-cell>
        </table:table-row>
        <table:table-row>
          <table:table-cell table:style-name="Table3.A1" office:value-type="string">
            <text:p text:style-name="P31">1 Garbage</text:p>
          </table:table-cell>
          <table:table-cell table:style-name="Table3.A1" office:value-type="string">
            <text:p text:style-name="P32">Try Again</text:p>
          </table:table-cell>
          <table:table-cell table:style-name="Table3.C1" office:value-type="string">
            <text:p text:style-name="P25">4</text:p>
          </table:table-cell>
          <table:table-cell table:style-name="Table3.C1" office:value-type="string">
            <text:p text:style-name="P27">250</text:p>
          </table:table-cell>
          <table:table-cell table:style-name="Table3.C1" office:value-type="string">
            <text:p text:style-name="P27">10</text:p>
          </table:table-cell>
        </table:table-row>
        <table:table-row>
          <table:table-cell table:style-name="Table3.A1" office:value-type="string">
            <text:p text:style-name="P30">~10-20%</text:p>
          </table:table-cell>
          <table:table-cell table:style-name="Table3.A1" office:value-type="string">
            <text:p text:style-name="P30">~55-75%</text:p>
          </table:table-cell>
          <table:table-cell table:style-name="Table3.C1" office:value-type="string">
            <text:p text:style-name="P25">5</text:p>
          </table:table-cell>
          <table:table-cell table:style-name="Table3.C1" office:value-type="string">
            <text:p text:style-name="P27">375</text:p>
          </table:table-cell>
          <table:table-cell table:style-name="Table3.C1" office:value-type="string">
            <text:p text:style-name="P27">15</text:p>
          </table:table-cell>
        </table:table-row>
      </table:table>
      <text:p text:style-name="P22"/>
      <text:p text:style-name="P19"/>
      <text:p text:style-name="P20">Scratch Tickets<text:span text:style-name="T14"/></text:p>
      <text:p text:style-name="P19">At the end of every Pull timer, you obtain a pull but also draw a Scratch Number. These are then placed on the <text:span text:style-name="T13">scratch ticket</text:span> located by your <text:span text:style-name="T13">hand</text:span>. You can obtain a maximum of 5 per session. At the end of e<text:span text:style-name="T13">ach</text:span> session, the Winning Numbers are announced, where you can win money and pulls. If you have to leave before then, your Scratch Numbers are still compared to the winning numbers, and you will receive your rewards at the start of your next session.</text:p>
      <text:p text:style-name="P19"/>
      <text:p text:style-name="P20">The Bounty Board<text:span text:style-name="T14"/></text:p>
      <text:p text:style-name="P19">Between sessions, everyone’s total earnings is compared. The three players with the most wealth will have Bounties. If a player has a bounty over their head, then players are rewarded extra for <text:soft-page-break/>attacking the player. First place will have a Double Bounty, where the reward is doubled. Typically, screwing someone over will reward you with taking their bet and getting a Pull. A bounty will reward one additional pull, a double bounty will reward you with two additional pulls.</text:p>
      <text:p text:style-name="P19"/>
      <text:p text:style-name="P20">Log Tokens<text:span text:style-name="T14"/></text:p>
      <text:p text:style-name="P19">Upon reaching $1000, you will divide your money by 10 and obtain what is known as a Log Token. They are an alternative currency that cannot be bet, but symbolize that your money has additional value. For the bounty board, Log Tokens multiply your balance by 10 each. For example, if you have $200 and 2 log tokens, then you have “$200e2,” thus $20 000.</text:p>
      <text:p text:style-name="P19"/>
      <text:p text:style-name="P20">Belts, Perks and Shops<text:span text:style-name="T14"/></text:p>
      <text:p text:style-name="P19">When you receive your first Log Token, you will be given the White Belt. This medal is an achievement of progress and opens you up to new features, including Perks and Shops. With each belt you obtain, you will be able to gain 1 perk, chosen from 3 random options. Shops will also be unlocked on a belt-by-belt basis, where the higher your belt the more options you’ll have. The shop can be found by the top right side of the table. The last benefit of Belts is that you get to contribute to the ever-growing background, custom designed and rendered!</text:p>
      <text:p text:style-name="P19"/>
      <text:p text:style-name="P20">Bankruptcy<text:span text:style-name="T14"/></text:p>
      <text:p text:style-name="P19">If you run out of chips, you will go Bankrupt. This does not mean your journey is over, however, far from it! <text:span text:style-name="T19">While bankrupt, you must forfeit any Log Tokens you currently possess</text:span> (a balance of 0 * 10<text:span text:style-name="T20">x</text:span> is still 0, after all), but start collecting Bankruptcy Tokens. You gain 1 Bankruptcy Token each turn, and can play with them. If you obtain 10 or more of them, you can convert them back into chips at a value of $10 each.</text:p>
      <text:p text:style-name="P33">I<text:span text:style-name="T2">I</text:span><text:span text:style-name="T21">I</text:span>.<text:tab/><text:span text:style-name="T21">Essences and Powerups</text:span></text:p>
      <text:p text:style-name="P34"/>
      <text:p text:style-name="P35">The primary gimmick of Kami North’s Blackjack is the use of <text:span text:style-name="T1">Powerups,</text:span> which are created by <text:span text:style-name="T22">E</text:span><text:span text:style-name="T1">ssences.</text:span> These powerups can have various effects and are useful in different situations. With the new addition of <text:span text:style-name="T22">C</text:span><text:span text:style-name="T1">rafting,</text:span> you can favor certain powerups over others to develop a unique playstyle.</text:p>
      <text:p text:style-name="P35"/>
      <text:p text:style-name="P35">To start obtaining powerups, you first earn Pulls through various means, most easily the Pull Timer. As you play, you’ll find yourself building a collection of essences that can quickly be used to your advantage or traded with other players for ones you desire.<text:span text:style-name="T11"/></text:p>
      <text:p text:style-name="P35"/>
      <text:p text:style-name="P35">Once you have obtained essences, you can then combine them by placing them on your Crafting Flower and notifying me. You cannot craft during a round, but you can freely craft as much as you’d like between rounds. The next section will have a list of the publicly shared powerups, as well as their recipes and functions.<text:span text:style-name="T11"/></text:p>
      <text:p text:style-name="P35"/>
      <text:p text:style-name="P35">You have a private area at your personal table, where you can craft and store powerups and essences in secret. A big theme of this season is discovery, so you do not have to publish your findings, though you can if you wish. All 3-essence powerups have been published so everyone has access to them.<text:span text:style-name="T11"/></text:p>
      <text:p text:style-name="P35"/>
      <text:p text:style-name="P35">If you craft using an invalid recipe, then what you will craft is known as <text:span text:style-name="T1">Garbage.</text:span> Garbage is most commonly used to participate in the lottery, though it can also be used to craft the “secret” <text:span text:style-name="T1">Force Water</text:span> powerup using 3 of the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Kami North" svg:font-family="'Kami North'" style:font-adornments="Bold" style:font-pitch="variable"/>
    <style:font-face style:name="Kami North1" svg:font-family="'Kami Nor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ffffff" loext:opacity="100%" style:font-name="Kami North1" fo:font-family="'Kami North'" style:font-style-name="Regular"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style:font-name="Kami North" fo:font-family="'Kami North'" style:font-style-name="Bold" style:font-pitch="variable"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font-size="16pt" style:font-size-asian="14pt" style:font-size-complex="16pt"/>
    </style:style>
    <style:page-layout style:name="Mpm1">
      <style:page-layout-properties fo:page-width="8.5in" fo:page-height="11in" style:num-format="1" style:print-orientation="portrait" fo:margin-top="0.7874in" fo:margin-bottom="0.7874in" fo:margin-left="0.7874in" fo:margin-right="0.7874in" fo:background-color="#111122"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111122"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111122"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08T10:36:42.791066081</meta:creation-date>
    <dc:date>2026-07-17T11:42:22.151898825</dc:date>
    <meta:editing-duration>PT5H6M53S</meta:editing-duration>
    <meta:editing-cycles>33</meta:editing-cycles>
    <meta:generator>LibreOffice/25.2.3.2$Linux_X86_64 LibreOffice_project/520$Build-2</meta:generator>
    <meta:print-date>2026-07-17T11:41:55.533759807</meta:print-date>
    <meta:printed-by>PDF files</meta:printed-by>
    <meta:document-statistic meta:table-count="3" meta:image-count="7" meta:object-count="0" meta:page-count="7" meta:paragraph-count="86" meta:word-count="1492" meta:character-count="8207" meta:non-whitespace-character-count="6782"/>
  </office:meta>
</office:document-meta>
</file>